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T1" style:family="text">
      <style:text-properties officeooo:rsid="0016f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Core</text:p>
      <text:p text:style-name="Standard"/>
      <text:p text:style-name="Standard">musiqman Jr.</text:p>
      <text:p text:style-name="Standard">Origin of the bANq</text:p>
      <text:p text:style-name="Standard"/>
      <text:p text:style-name="Standard">bANqのIP思想における創造的源泉。</text:p>
      <text:p text:style-name="Standard">構想以前の段階からプロジェクトの核に関わり、音楽とアートの接続点を形成する存在。</text:p>
      <text:p text:style-name="Standard">永井博とのコラボレーションをはじめ、bANqの主要IPにおいてコンセプト形成・プロデュース・表現を担う。</text:p>
      <text:p text:style-name="Standard">bAnqの内側を駆動させるCreative Core。</text:p>
      <text:p text:style-name="Standard"/>
      <text:p text:style-name="Standard"/>
      <text:p text:style-name="Standard"/>
      <text:p text:style-name="Standard">The Custodians</text:p>
      <text:p text:style-name="Standard"/>
      <text:p text:style-name="Standard">思想を構造化し、IPおよびCPを受け止める器としてbANqを設計。</text:p>
      <text:p text:style-name="Standard">音楽・アート領域での実践知と戦略思考を接続し、創造物を“消費”ではなく“資産”として扱う運用基盤を構築する。</text:p>
      <text:p text:style-name="Standard"/>
      <text:p text:style-name="Standard">S-<text:span text:style-name="T1">ichiro</text:span></text:p>
      <text:p text:style-name="Standard">Strategic</text:p>
      <text:p text:style-name="Standard">Structure / Systems</text:p>
      <text:p text:style-name="Standard"/>
      <text:p text:style-name="Standard">J-nosuke</text:p>
      <text:p text:style-name="Standard">Creative</text:p>
      <text:p text:style-name="Standard">Music / Cul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07T13:45:38.045051376</meta:creation-date>
    <dc:date>2026-03-15T23:40:07.746985472</dc:date>
    <meta:editing-duration>PT10M8S</meta:editing-duration>
    <meta:editing-cycles>2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16" meta:word-count="218" meta:character-count="344" meta:non-whitespace-character-count="333"/>
  </office:meta>
</office:document-meta>
</file>