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1a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QUE(S)T 制作開始のお知らせ</text:p>
      <text:p text:style-name="P1"/>
      <text:p text:style-name="P1">bANqの最初の<text:span text:style-name="T1">IP</text:span>プロジェクトとして、</text:p>
      <text:p text:style-name="P1">musiqman Jr.氏 による音楽作品「BANQUE(S)T」<text:span text:style-name="T1">(バンケット)</text:span>の制作を開始しました。</text:p>
      <text:p text:style-name="P1"/>
      <text:p text:style-name="P1">本作は、<text:span text:style-name="T1">Soul/ R&amp;B/ AOR</text:span>の楽曲を再解釈しながら、</text:p>
      <text:p text:style-name="P1">音楽の文脈と位置づけを再構築する試みです。</text:p>
      <text:p text:style-name="P1"/>
      <text:p text:style-name="P1">制作は単なる録音にとどまらず、</text:p>
      <text:p text:style-name="P1">どのように提示され、どのように接続されるかを含めた、</text:p>
      <text:p text:style-name="P1">IPとしての設計を前提としています。</text:p>
      <text:p text:style-name="P1"/>
      <text:p text:style-name="P1">本プロジェクトは、</text:p>
      <text:p text:style-name="P1">音楽を“完成品”としてではなく、</text:p>
      <text:p text:style-name="P1">運用される資産として扱う最初の実践となります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13T19:56:32.275861658</meta:creation-date>
    <dc:date>2026-04-13T20:00:41.236531232</dc:date>
    <meta:editing-duration>PT4M9S</meta:editing-duration>
    <meta:editing-cycles>1</meta:editing-cycles>
    <meta:document-statistic meta:table-count="0" meta:image-count="0" meta:object-count="0" meta:page-count="1" meta:paragraph-count="11" meta:word-count="203" meta:character-count="249" meta:non-whitespace-character-count="244"/>
    <meta:generator>LibreOffice/7.2.5.2$MacOSX_X86_64 LibreOffice_project/499f9727c189e6ef3471021d6132d4c694f357e5</meta:generator>
  </office:meta>
</office:document-meta>
</file>