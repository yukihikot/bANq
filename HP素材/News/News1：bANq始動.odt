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1bead" officeooo:paragraph-rsid="0001bea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q 始動のお知らせ</text:p>
      <text:p text:style-name="P1"/>
      <text:p text:style-name="P1">bANqは、音楽・アート・デザインを横断し、</text:p>
      <text:p text:style-name="P1">知的資産（IP）と文化資産（CP）を運用するプロジェクトとして始動しました。</text:p>
      <text:p text:style-name="P1"/>
      <text:p text:style-name="P1">私たちは、価値を消費するのではなく、</text:p>
      <text:p text:style-name="P1">守り、育て、次の時代へ手渡すことを目的としています。</text:p>
      <text:p text:style-name="P1"/>
      <text:p text:style-name="P1">音楽は関係の中で変化し、</text:p>
      <text:p text:style-name="P1">文化資産は時間の中で成熟していきます。</text:p>
      <text:p text:style-name="P1"/>
      <text:p text:style-name="P1">bANqはその両方を扱い、</text:p>
      <text:p text:style-name="P1">継続的な関与を通じて価値を運用していきます。</text:p>
      <text:p text:style-name="P1"/>
      <text:p text:style-name="P2">※”はじめてのIPCP”(Journ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13T19:48:22.689464976</meta:creation-date>
    <dc:date>2026-04-13T19:55:41.450437042</dc:date>
    <meta:editing-duration>PT7M19S</meta:editing-duration>
    <meta:editing-cycles>1</meta:editing-cycles>
    <meta:document-statistic meta:table-count="0" meta:image-count="0" meta:object-count="0" meta:page-count="1" meta:paragraph-count="10" meta:word-count="177" meta:character-count="203" meta:non-whitespace-character-count="202"/>
    <meta:generator>LibreOffice/7.2.5.2$MacOSX_X86_64 LibreOffice_project/499f9727c189e6ef3471021d6132d4c694f357e5</meta:generator>
  </office:meta>
</office:document-meta>
</file>