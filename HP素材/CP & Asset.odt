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webkit-standard" svg:font-family="webkit-standard"/>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automatic-styles>
    <style:style style:name="P1" style:family="paragraph" style:parent-style-name="Standard">
      <style:text-properties fo:font-variant="normal" fo:text-transform="none" fo:color="#000000" loext:opacity="100%" style:font-name="Liberation Serif" fo:font-size="12pt" fo:letter-spacing="normal" officeooo:paragraph-rsid="000ac993" style:font-name-asian="Liberation Serif" style:font-size-asian="12pt" style:font-style-asian="normal" style:font-weight-asian="normal" style:font-size-complex="12pt"/>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paragraph-rsid="000ac993" style:font-name-asian="Liberation Serif" style:font-size-asian="12pt" style:font-style-asian="normal" style:font-weight-asian="normal" style:font-size-complex="12pt"/>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paragraph-rsid="000ac993" style:font-name-asian="Liberation Serif" style:font-size-asian="12pt" style:font-size-complex="12pt"/>
    </style:style>
    <style:style style:name="P4" style:family="paragraph" style:parent-style-name="Standard">
      <style:text-properties fo:font-variant="normal" fo:text-transform="none" fo:color="#000000" loext:opacity="100%" style:font-name="Liberation Serif" fo:font-size="20pt" fo:letter-spacing="normal" officeooo:paragraph-rsid="000ac993" style:font-name-asian="Liberation Serif" style:font-size-asian="20pt" style:font-size-complex="20pt"/>
    </style:style>
    <style:style style:name="P5" style:family="paragraph" style:parent-style-name="Text_20_body">
      <style:text-properties fo:font-variant="normal" fo:text-transform="none" fo:color="#000000" loext:opacity="100%" style:font-name="Liberation Serif" fo:font-size="20pt" fo:letter-spacing="normal" officeooo:paragraph-rsid="000ac993" style:font-name-asian="Liberation Serif" style:font-size-asian="20pt" style:font-style-asian="normal" style:font-weight-asian="normal" style:font-size-complex="20pt"/>
    </style:style>
    <style:style style:name="P6" style:family="paragraph" style:parent-style-name="Text_20_body">
      <style:text-properties fo:font-variant="normal" fo:text-transform="none" fo:color="#000000" loext:opacity="100%" style:font-name="Liberation Serif" fo:font-size="11pt" fo:letter-spacing="normal" officeooo:paragraph-rsid="000ac993" style:font-name-asian="Liberation Serif" style:font-size-asian="11pt" style:font-style-asian="normal" style:font-weight-asian="normal" style:font-size-complex="11pt"/>
    </style:style>
    <style:style style:name="P7" style:family="paragraph" style:parent-style-name="Text_20_body">
      <style:text-properties fo:font-variant="normal" fo:text-transform="none" fo:color="#000000" loext:opacity="100%" style:font-name="Liberation Serif" fo:font-size="10.5pt" fo:letter-spacing="normal" fo:font-style="normal" fo:font-weight="normal" officeooo:paragraph-rsid="000ac993" style:font-name-asian="Liberation Serif" style:font-size-asian="10.5pt" style:font-size-complex="10.5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loext:opacity="100%" fo:font-size="12pt" fo:letter-spacing="normal" officeooo:paragraph-rsid="000ac993" style:font-size-asian="12pt" style:font-style-asian="normal" style:font-weight-asian="normal" style:font-size-complex="12pt"/>
    </style:style>
    <style:style style:name="P9" style:family="paragraph" style:parent-style-name="Text_20_body">
      <style:text-properties fo:font-variant="normal" fo:text-transform="none" fo:color="#000000" loext:opacity="100%" fo:font-size="12pt" fo:letter-spacing="normal" officeooo:paragraph-rsid="000ac993" style:font-name-asian="Liberation Serif" style:font-size-asian="12pt" style:font-style-asian="normal" style:font-weight-asian="normal" style:font-size-complex="12pt"/>
    </style:style>
    <style:style style:name="P10" style:family="paragraph" style:parent-style-name="Standard">
      <style:text-properties fo:font-size="20pt" officeooo:rsid="00206a4f" officeooo:paragraph-rsid="000ac993" style:font-size-asian="20pt" style:font-size-complex="20pt"/>
    </style:style>
    <style:style style:name="P11" style:family="paragraph" style:parent-style-name="Standard">
      <style:text-properties fo:font-size="20pt" officeooo:rsid="0019ef91" officeooo:paragraph-rsid="000ac993" style:font-size-asian="20pt" style:font-size-complex="20pt"/>
    </style:style>
    <style:style style:name="P12" style:family="paragraph" style:parent-style-name="Standard">
      <style:text-properties fo:font-size="20pt" officeooo:paragraph-rsid="000ac993" style:font-size-asian="20pt" style:font-size-complex="20pt"/>
    </style:style>
    <style:style style:name="P13" style:family="paragraph" style:parent-style-name="Standard">
      <style:text-properties fo:font-size="20pt" officeooo:paragraph-rsid="000ac993"/>
    </style:style>
    <style:style style:name="P14" style:family="paragraph" style:parent-style-name="Standard">
      <style:text-properties style:font-name="Liberation Serif" fo:font-size="20pt" officeooo:rsid="0019ef91" officeooo:paragraph-rsid="000ac993" style:font-name-asian="Liberation Serif" style:font-size-asian="20pt" style:font-size-complex="20pt"/>
    </style:style>
    <style:style style:name="P15" style:family="paragraph" style:parent-style-name="Standard">
      <style:text-properties style:font-name="Liberation Serif" fo:font-size="20pt" officeooo:paragraph-rsid="000ac993" style:font-name-asian="Liberation Serif" style:font-size-asian="20pt" style:font-size-complex="20pt"/>
    </style:style>
    <style:style style:name="P16" style:family="paragraph" style:parent-style-name="Text_20_body">
      <style:text-properties style:font-name="Liberation Serif" fo:font-size="20pt" officeooo:paragraph-rsid="000ac993" style:font-name-asian="Liberation Serif" style:font-size-asian="20pt" style:font-size-complex="20pt"/>
    </style:style>
    <style:style style:name="P17" style:family="paragraph" style:parent-style-name="Standard">
      <style:text-properties style:font-name="Liberation Serif" fo:font-size="12pt" officeooo:paragraph-rsid="000ac993" style:font-name-asian="Liberation Serif" style:font-size-asian="12pt" style:font-size-complex="12pt"/>
    </style:style>
    <style:style style:name="P18" style:family="paragraph" style:parent-style-name="Text_20_body">
      <style:text-properties style:font-name="Liberation Serif" fo:font-size="12pt" officeooo:paragraph-rsid="000ac993" style:font-name-asian="Liberation Serif" style:font-size-asian="12pt" style:font-size-complex="12pt"/>
    </style:style>
    <style:style style:name="P19" style:family="paragraph" style:parent-style-name="Text_20_body">
      <style:text-properties style:font-name="Liberation Serif" fo:font-size="11pt" officeooo:paragraph-rsid="000ac993" style:font-name-asian="Liberation Serif" style:font-size-asian="11pt" style:font-size-complex="11pt"/>
    </style:style>
    <style:style style:name="P20" style:family="paragraph" style:parent-style-name="Text_20_body">
      <style:paragraph-properties fo:margin-left="0cm" fo:margin-right="0cm" fo:orphans="2" fo:widows="2" fo:text-indent="0cm" style:auto-text-indent="false"/>
      <style:text-properties officeooo:paragraph-rsid="000ac993"/>
    </style:style>
    <style:style style:name="P21" style:family="paragraph" style:parent-style-name="Text_20_body">
      <style:paragraph-properties fo:margin-left="0cm" fo:margin-right="0cm" fo:orphans="2" fo:widows="2" fo:text-indent="0cm" style:auto-text-indent="false"/>
      <style:text-properties fo:font-size="12pt" officeooo:paragraph-rsid="000ac993" style:font-size-asian="12pt" style:font-size-complex="12pt"/>
    </style:style>
    <style:style style:name="P22" style:family="paragraph" style:parent-style-name="Text_20_body">
      <style:text-properties fo:font-size="12pt" officeooo:paragraph-rsid="000ac993" style:font-size-asian="12pt" style:font-size-complex="12pt"/>
    </style:style>
    <style:style style:name="P23" style:family="paragraph" style:parent-style-name="Text_20_body">
      <style:text-properties fo:font-size="16pt" officeooo:paragraph-rsid="000ac993" style:font-name-asian="Liberation Serif" style:font-size-asian="16pt" style:font-size-complex="16pt"/>
    </style:style>
    <style:style style:name="P24" style:family="paragraph" style:parent-style-name="Text_20_body">
      <style:text-properties officeooo:paragraph-rsid="000ac993"/>
    </style:style>
    <style:style style:name="P25" style:family="paragraph" style:parent-style-name="Text_20_body">
      <style:text-properties fo:font-variant="normal" fo:text-transform="none" fo:color="#000000" loext:opacity="100%" style:font-name="Liberation Serif" fo:font-size="11pt" fo:letter-spacing="normal" officeooo:paragraph-rsid="000ac993" style:font-name-asian="Liberation Serif" style:font-size-asian="11pt" style:font-style-asian="normal" style:font-weight-asian="normal" style:font-size-complex="11pt"/>
    </style:style>
    <style:style style:name="T1" style:family="text">
      <style:text-properties officeooo:rsid="00246e53"/>
    </style:style>
    <style:style style:name="T2" style:family="text">
      <style:text-properties officeooo:rsid="0019ef91" style:font-size-asian="20pt" style:font-size-complex="20pt"/>
    </style:style>
    <style:style style:name="T3" style:family="text">
      <style:text-properties officeooo:rsid="00206a4f" style:font-size-asian="20pt" style:font-size-complex="20pt"/>
    </style:style>
    <style:style style:name="T4" style:family="text">
      <style:text-properties officeooo:rsid="001d341e" style:font-size-asian="20pt" style:font-size-complex="20pt"/>
    </style:style>
    <style:style style:name="T5" style:family="text">
      <style:text-properties fo:font-size="16pt" officeooo:rsid="001d341e" style:font-size-asian="16pt" style:font-size-complex="16pt"/>
    </style:style>
    <style:style style:name="T6" style:family="text">
      <style:text-properties fo:font-variant="normal" fo:text-transform="none" fo:color="#000000" loext:opacity="100%" style:font-name="webkit-standard" fo:font-size="16pt" fo:letter-spacing="normal" fo:font-style="normal" fo:font-weight="normal" style:font-size-asian="16pt" style:font-size-complex="16pt"/>
    </style:style>
    <style:style style:name="T7" style:family="text">
      <style:text-properties fo:font-variant="normal" fo:text-transform="none" fo:color="#000000" loext:opacity="100%" style:font-name="webkit-standard" fo:font-size="16pt" fo:letter-spacing="normal" fo:font-style="normal" fo:font-weight="normal" officeooo:rsid="001ddd5c" style:font-size-asian="16pt" style:font-size-complex="16pt"/>
    </style:style>
    <style:style style:name="T8" style:family="text">
      <style:text-properties fo:font-variant="normal" fo:text-transform="none" fo:color="#000000" loext:opacity="100%" style:font-name="webkit-standard" fo:font-size="16pt" fo:letter-spacing="normal" fo:font-style="normal" fo:font-weight="normal" officeooo:rsid="001d341e" style:font-size-asian="16pt" style:font-size-complex="16pt"/>
    </style:style>
    <style:style style:name="T9" style:family="text">
      <style:text-properties fo:font-variant="normal" fo:text-transform="none" fo:color="#000000" loext:opacity="100%" style:font-name="webkit-standard" fo:font-size="14pt" fo:letter-spacing="normal" fo:font-style="normal" fo:font-weight="normal" style:font-name-asian="Liberation Serif"/>
    </style:style>
    <style:style style:name="T10" style:family="text">
      <style:text-properties fo:font-variant="normal" fo:text-transform="none" fo:color="#000000" loext:opacity="100%" style:font-name="webkit-standard" fo:letter-spacing="normal" fo:font-style="normal" fo:font-weight="normal"/>
    </style:style>
    <style:style style:name="T11" style:family="text">
      <style:text-properties fo:font-variant="normal" fo:text-transform="none" fo:color="#000000" loext:opacity="100%" style:font-name="webkit-standard" fo:letter-spacing="normal" fo:font-style="normal" fo:font-weight="normal" officeooo:rsid="001ddd5c"/>
    </style:style>
    <style:style style:name="T12" style:family="text">
      <style:text-properties fo:font-variant="normal" fo:text-transform="none" fo:color="#000000" loext:opacity="100%" fo:font-size="12pt" fo:letter-spacing="normal" style:font-size-asian="12pt" style:font-style-asian="normal" style:font-weight-asian="normal" style:font-size-complex="12pt"/>
    </style:style>
    <style:style style:name="T13" style:family="text">
      <style:text-properties fo:font-variant="normal" fo:text-transform="none" fo:color="#000000" loext:opacity="100%" fo:font-size="12pt" fo:letter-spacing="normal" fo:font-style="normal" fo:font-weight="normal" style:font-size-asian="12pt" style:font-size-complex="12pt"/>
    </style:style>
    <style:style style:name="T14" style:family="text">
      <style:text-properties fo:font-variant="normal" fo:text-transform="none" fo:color="#000000" loext:opacity="100%" style:font-name="Liberation Serif" fo:letter-spacing="normal" style:font-name-asian="webkit-standard" style:font-size-asian="14pt" style:font-style-asian="normal" style:font-weight-asian="normal"/>
    </style:style>
    <style:style style:name="T15" style:family="text">
      <style:text-properties fo:font-variant="normal" fo:text-transform="none" fo:color="#000000" loext:opacity="100%" style:font-name="Liberation Serif" fo:letter-spacing="normal" fo:font-style="normal" fo:font-weight="normal" officeooo:rsid="001ddd5c" style:font-name-asian="Liberation Serif"/>
    </style:style>
    <style:style style:name="T16" style:family="text">
      <style:text-properties fo:font-variant="normal" fo:text-transform="none" fo:color="#000000" loext:opacity="100%" style:font-name="Liberation Serif" fo:letter-spacing="normal" fo:font-style="normal" fo:font-weight="normal" officeooo:rsid="001ddd5c" style:font-name-asian="Liberation Serif" style:font-style-asian="normal" style:font-weight-asian="normal"/>
    </style:style>
    <style:style style:name="T17" style:family="text">
      <style:text-properties fo:font-variant="normal" fo:text-transform="none" fo:color="#000000" loext:opacity="100%" style:font-name="Liberation Serif" fo:letter-spacing="normal" style:font-name-asian="Liberation Serif" style:font-style-asian="normal" style:font-weight-asian="normal"/>
    </style:style>
    <style:style style:name="T18" style:family="text">
      <style:text-properties fo:font-variant="normal" fo:text-transform="none" fo:color="#000000" loext:opacity="100%" style:font-name="Liberation Serif" fo:font-size="12pt" fo:letter-spacing="normal" fo:font-style="normal" fo:font-weight="normal" style:font-size-asian="12pt" style:font-style-asian="normal" style:font-weight-asian="normal" style:font-size-complex="12pt"/>
    </style:style>
    <style:style style:name="T19" style:family="text">
      <style:text-properties fo:font-variant="normal" fo:text-transform="none" fo:color="#000000" loext:opacity="100%" style:font-name="Liberation Serif" fo:font-size="12pt" fo:letter-spacing="normal" style:font-size-asian="12pt" style:font-style-asian="normal" style:font-weight-asian="normal" style:font-size-complex="12pt"/>
    </style:style>
    <style:style style:name="T20" style:family="text">
      <style:text-properties fo:font-variant="normal" fo:text-transform="none" fo:color="#000000" loext:opacity="100%" style:font-name="Liberation Serif" fo:font-size="12pt" fo:letter-spacing="normal" style:font-name-asian="Liberation Serif" style:font-size-asian="12pt" style:font-style-asian="normal" style:font-weight-asian="normal" style:font-size-complex="12pt"/>
    </style:style>
    <style:style style:name="T21" style:family="text">
      <style:text-properties fo:font-variant="normal" fo:text-transform="none" fo:color="#000000" loext:opacity="100%" style:font-name="Liberation Serif" fo:font-size="12pt" fo:letter-spacing="normal" officeooo:rsid="001fcb16" style:font-name-asian="Liberation Serif" style:font-size-asian="12pt" style:font-style-asian="normal" style:font-weight-asian="normal" style:font-size-complex="12pt"/>
    </style:style>
    <style:style style:name="T22" style:family="text">
      <style:text-properties fo:font-variant="normal" fo:text-transform="none" fo:color="#000000" loext:opacity="100%" fo:letter-spacing="normal" style:font-style-asian="normal" style:font-weight-asian="normal"/>
    </style:style>
    <style:style style:name="T23" style:family="text">
      <style:text-properties fo:font-variant="normal" fo:text-transform="none" fo:color="#000000" loext:opacity="100%" fo:letter-spacing="normal" fo:font-style="normal" fo:font-weight="normal"/>
    </style:style>
    <style:style style:name="T24" style:family="text">
      <style:text-properties fo:font-variant="normal" fo:text-transform="none" fo:color="#000000" loext:opacity="100%" fo:letter-spacing="normal" fo:font-style="normal" fo:font-weight="normal" officeooo:rsid="001ddd5c"/>
    </style:style>
    <style:style style:name="T25" style:family="text">
      <style:text-properties fo:font-variant="normal" fo:text-transform="none" fo:color="#000000" loext:opacity="100%" fo:letter-spacing="normal" fo:font-style="normal" fo:font-weight="normal" officeooo:rsid="001fcb16"/>
    </style:style>
    <style:style style:name="T26" style:family="text">
      <style:text-properties style:font-name="Liberation Serif" style:font-name-asian="Liberation Serif"/>
    </style:style>
    <style:style style:name="T27" style:family="text">
      <style:text-properties style:font-name="Liberation Serif" officeooo:rsid="0019ef91" style:font-name-asian="Liberation Serif"/>
    </style:style>
    <style:style style:name="T28" style:family="text">
      <style:text-properties style:font-name="Liberation Serif" officeooo:rsid="001ddd5c" style:font-name-asian="Liberation Serif"/>
    </style:style>
    <style:style style:name="T29" style:family="text">
      <style:text-properties style:font-name="Liberation Serif" officeooo:rsid="00206a4f" style:font-name-asian="Liberation Serif"/>
    </style:style>
    <style:style style:name="T30" style:family="text">
      <style:text-properties officeooo:rsid="001ddd5c"/>
    </style:style>
    <style:style style:name="T31" style:family="text">
      <style:text-properties officeooo:rsid="0019ef91"/>
    </style:style>
    <style:style style:name="T32" style:family="text">
      <style:text-properties style:font-name="webkit-standard" fo:font-size="14pt" fo:font-style="normal" fo:font-weight="normal"/>
    </style:style>
    <style:style style:name="T33" style:family="text">
      <style:text-properties style:font-name-asian="webkit-standard" style:font-size-asian="14pt" style:font-style-asian="normal" style:font-weight-asian="normal"/>
    </style:style>
    <style:style style:name="T34" style:family="text">
      <style:text-properties style:font-style-asian="normal" style:font-weight-asian="normal"/>
    </style:style>
    <style:style style:name="T35" style:family="text">
      <style:text-properties officeooo:rsid="0020b14c" style:font-style-asian="normal" style:font-weight-asian="normal"/>
    </style:style>
    <style:style style:name="T36" style:family="text">
      <style:text-properties fo:font-style="normal" fo:font-weight="normal"/>
    </style:style>
    <style:style style:name="T37" style:family="text">
      <style:text-properties fo:font-style="normal" fo:font-weight="normal" style:font-style-asian="normal" style:font-weight-asian="normal"/>
    </style:style>
    <style:style style:name="T38" style:family="text">
      <style:text-properties fo:font-style="normal" fo:font-weight="normal" officeooo:rsid="002078d9" style:font-style-asian="normal" style:font-weight-asian="normal"/>
    </style:style>
    <style:style style:name="T39" style:family="text">
      <style:text-properties officeooo:rsid="001fcb16"/>
    </style:style>
    <style:style style:name="T40" style:family="text">
      <style:text-properties officeooo:rsid="00206a4f"/>
    </style:style>
    <style:style style:name="T41" style:family="text">
      <style:text-properties officeooo:rsid="00242877"/>
    </style:style>
    <style:style style:name="T42" style:family="text">
      <style:text-properties officeooo:rsid="0023bb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CP </text:span><text:span text:style-name="T3">&amp; Asset Stewardship</text:span></text:p>
      <text:p text:style-name="P10"/>
      <text:p text:style-name="P13"><text:span text:style-name="T4">Stewardship =</text:span><text:span text:style-name="T5"> </text:span><text:span text:style-name="T6">Protecting × Growing</text:span><text:span text:style-name="T7">(</text:span><text:span text:style-name="T8">守る×育てる</text:span><text:span text:style-name="T7">)</text:span></text:p>
      <text:p text:style-name="P24"><text:span text:style-name="T12">ギターを「完成した物」としてではなく、</text:span><text:span text:style-name="Strong_20_Emphasis"><text:span text:style-name="T12">時間の中で育つ文化資産</text:span></text:span><text:span text:style-name="T12">として扱うための取り組みです。</text:span></text:p>
      <text:p text:style-name="P11"><text:s/>　　　　　 <text:s text:c="6"/>Guitar Stewardship</text:p>
      <text:p text:style-name="P11"><text:s text:c="16"/>　　　　 　 │</text:p>
      <text:p text:style-name="P11"><text:s text:c="3"/>┌─────────┴──────────┐</text:p>
      <text:p text:style-name="P11"><text:s text:c="3"/>│ <text:s text:c="19"/>　　　　　　　　　 <text:s text:c="12"/>│</text:p>
      <text:p text:style-name="P11">Asset Care <text:s text:c="14"/>　　　　　　　 <text:s text:c="3"/>Growth Program</text:p>
      <text:p text:style-name="P11">Protect &amp; Sustain <text:s text:c="4"/>　　　　　　 <text:s text:c="4"/>Observe &amp; Develop</text:p>
      <text:p text:style-name="P11"><text:s text:c="3"/>│ <text:s text:c="18"/>　　　　　　　　　　 <text:s text:c="13"/>│</text:p>
      <text:p text:style-name="P11">Present Stability <text:s text:c="4"/>　　　　　　　　 <text:s text:c="2"/>Future Potential</text:p>
      <text:p text:style-name="P14"/>
      <text:p text:style-name="P14"/>
      <text:p text:style-name="P14"/>
      <text:p text:style-name="P14"/>
      <text:p text:style-name="P14">左側</text:p>
      <text:p text:style-name="P12"><text:span text:style-name="T27">・</text:span><text:span text:style-name="T26">Guitar Asset Care／保護・運用</text:span></text:p>
      <text:p text:style-name="P12"><text:span text:style-name="T9">Focus</text:span><text:span text:style-name="T14">：</text:span><text:span text:style-name="T9">Present Stability</text:span></text:p>
      <text:p text:style-name="P1">「ギターの状態と価値を守り、長期的な視点で安定したコンディションを維持する。</text:p>
      <text:p text:style-name="P17">つまり、ギターを所有するのではなく、時間と価値を引き受ける。」</text:p>
      <text:p text:style-name="P7"/>
      <text:p text:style-name="P16"><text:span text:style-name="T13">Guitar Asset Care</text:span><text:span text:style-name="T12">は、アコースティックギターを</text:span><text:span text:style-name="Strong_20_Emphasis"><text:span text:style-name="T12">文化資産（</text:span></text:span><text:span text:style-name="Strong_20_Emphasis"><text:span text:style-name="T13">CP</text:span></text:span><text:span text:style-name="Strong_20_Emphasis"><text:span text:style-name="T12">）として管理・運用する</text:span></text:span><text:span text:style-name="T12">ための取り組みです。</text:span></text:p>
      <text:p text:style-name="P8">私たちはギターを単なる楽器や商品としてではなく、時間や演奏、環境との関わりによって価値が変化していく存在だと考えています。保管環境、使用状況、コンディションの維持だけでなく、将来の成長や変化を見据えながら、ギターが本来持つ可能性を損なわない形で中・長期的な視点から関与していきます。</text:p>
      <text:p text:style-name="P20"><text:soft-page-break/><text:span text:style-name="T13">Guitar Asset Care</text:span><text:span text:style-name="T12">は、「預かる」ことを目的とするサービスではなく、</text:span><text:span text:style-name="Strong_20_Emphasis"><text:span text:style-name="T12">価値を守り、継続させるための</text:span></text:span><text:span text:style-name="Strong_20_Emphasis"><text:span text:style-name="T13">Stewardship</text:span></text:span><text:span text:style-name="T12">です。</text:span></text:p>
      <text:p text:style-name="P22"><text:span text:style-name="T26">【</text:span><text:span text:style-name="T15">Our Approach</text:span><text:span text:style-name="T26">】</text:span></text:p>
      <text:p text:style-name="P18">・Protection（保護）</text:p>
      <text:p text:style-name="P18">：ギターを単なる物としてではなく、時間を含んだ文化資産として守ります。</text:p>
      <text:p text:style-name="P22"><text:span text:style-name="T26">・Condition Management</text:span><text:span text:style-name="T28">(</text:span>環境・使用状況の最適化<text:span text:style-name="T30">)</text:span></text:p>
      <text:p text:style-name="P22">：保管環境や演奏状況を整え、ギター本来の状態が維持されるように管理します。</text:p>
      <text:p text:style-name="P22">・Long-term Sustainability<text:span text:style-name="T30">(</text:span>長期的な価値の維持<text:span text:style-name="T30">)</text:span></text:p>
      <text:p text:style-name="P22">：短期的な音や市場価値でなく、時間の中で継続して価値を持ち続ける状態を目指します。</text:p>
      <text:p text:style-name="P22">・<text:span text:style-name="T10">Asset Stewardship Design</text:span><text:span text:style-name="T11">(</text:span>文化資産としての運用設計<text:span text:style-name="T30">)</text:span></text:p>
      <text:p text:style-name="P22">：所有ではなく関与という視点から、将来へ価値を引き継ぐための運用を設計します。</text:p>
      <text:p text:style-name="P22"/>
      <text:p text:style-name="P22"><text:span text:style-name="T26">→気温・湿度の一定の環境で保管し、未来のコンディションをより安定的に保っていくための音響調整も致します。ただ</text:span><text:span text:style-name="T29">置いておくだけではなく、提携ギタールシアーや輸入代理店のbANqチームによってギターに必要なテンションをかけて、適度に振動させることなどでギターの安定性を高めます。また、日本を代表するギタリストのレコーディングへの貸出なども行います。</text:span></text:p>
      <text:p text:style-name="P18"/>
      <text:p text:style-name="P19"/>
      <text:p text:style-name="P15">右側</text:p>
      <text:p text:style-name="P15"><text:span text:style-name="T31">・</text:span>Guitar Growth Program／育成・観測</text:p>
      <text:p text:style-name="P4"><text:span text:style-name="T32">Focus</text:span><text:span text:style-name="T33">：</text:span><text:span text:style-name="T32">Future Potential</text:span></text:p>
      <text:p text:style-name="P9">「ギターの変化を数値化し、成長していく過程そのものを理解・記録する。完成した音ではなく、育っていく過程を観測する。」</text:p>
      <text:p text:style-name="P23"><text:span text:style-name="T18">Guitar Growth Program</text:span><text:span text:style-name="T19">は、アコースティックギターの成長過程を</text:span><text:span text:style-name="Strong_20_Emphasis"><text:span text:style-name="T19">観測・記録・理解するためのプログラム</text:span></text:span><text:span text:style-name="T19">です。</text:span></text:p>
      <text:p text:style-name="P3"><text:span text:style-name="T34">ギターは製造された瞬間に完成するのではなく、演奏時間、環境、構造の変化によって長い時間をかけて成熟していきます。</text:span><text:span text:style-name="T37">Growth</text:span><text:span text:style-name="T38">Program</text:span><text:span text:style-name="T34">では、演奏履歴や環境要素、</text:span><text:span text:style-name="T36">FFT</text:span><text:span text:style-name="T34">を含む音響的な観測を通じて、ギターの</text:span><text:span text:style-name="T35">現在地から</text:span><text:span text:style-name="T34">どのように変化していくのかを記録し、その過程そのものを価値として捉えます。</text:span></text:p>
      <text:p text:style-name="P20"><text:span text:style-name="T20">このプログラムは、「今の音」を評価するためではなく、</text:span><text:span text:style-name="T21">成長</text:span><text:span text:style-name="Strong_20_Emphasis"><text:span text:style-name="T20">を理解するための観測</text:span></text:span><text:span text:style-name="T20">です。</text:span></text:p>
      <text:p text:style-name="P21"><text:span text:style-name="T17">【</text:span><text:span text:style-name="T16">Our Approach</text:span><text:span text:style-name="T17">】</text:span></text:p>
      <text:p text:style-name="P2">・Maturity Index（成熟度観測）</text:p>
      <text:p text:style-name="P2"><text:soft-page-break/>：ギターがどの段階にあるのかを、時間と変化の視点から観測します。</text:p>
      <text:p text:style-name="P18"><text:span text:style-name="T22">・</text:span>FFT<text:span text:style-name="T23">Analysis</text:span><text:span text:style-name="T24">(</text:span>音響変化の記録<text:span text:style-name="T30">)</text:span></text:p>
      <text:p text:style-name="P18">：音響特性の変化を定点的に記録し、成長の傾向を客観的に捉えます。</text:p>
      <text:p text:style-name="P18">・<text:span text:style-name="T23">Development Tracking</text:span><text:span text:style-name="T24">(</text:span>演奏・時間による成長分析<text:span text:style-name="T30">)</text:span></text:p>
      <text:p text:style-name="P18">：演奏時間や使用環境と音の変化を照らし合わせ、成長プロセスを追跡します。</text:p>
      <text:p text:style-name="P18">・<text:span text:style-name="T23">Visualization of Growth</text:span><text:span text:style-name="T25">(</text:span>成長プロセスの可視化<text:span text:style-name="T39">)</text:span></text:p>
      <text:p text:style-name="P18">：数値と感覚の両面から、ギターが育っていく過程を理解できる形にします。</text:p>
      <text:p text:style-name="P18"/>
      <text:p text:style-name="P18">コンディションを保つために、アーティストやスタジオミュージシャン、<text:span text:style-name="T40">bANqチーム</text:span>による積極的な音響調整・エイジングを行います。日本を代表するギタリストによるエイジングも行います。またギター音響評価アプリも開発中です。</text:p>
      <text:p text:style-name="P6"/>
      <text:p text:style-name="P6">表の下に</text:p>
      <text:p text:style-name="P5">Observation Log<text:span text:style-name="T41">(※See Instagram for this Guitars)</text:span></text:p>
      <text:p text:style-name="P6">・Martin 000-18 Authentic 1937 <text:span text:style-name="T41">(2007)</text:span></text:p>
      <text:p text:style-name="P6"><text:s text:c="2"/>Phase : Late Growth　<text:span text:style-name="T1">7</text:span><text:span text:style-name="T42">/10</text:span></text:p>
      <text:p text:style-name="P6"><text:s text:c="2"/>Observation : Mid range stabilized</text:p>
      <text:p text:style-name="P6"/>
      <text:p text:style-name="P6">・Martin 000-30H Authentic 1919 <text:span text:style-name="T41">(2018)</text:span></text:p>
      <text:p text:style-name="P6"><text:s text:c="2"/>Phase : Developing　<text:span text:style-name="T42">3/10</text:span></text:p>
      <text:p text:style-name="P6"><text:s text:c="2"/>Observation : Harmonic response increasing</text:p>
      <text:p text:style-name="P6"/>
      <text:p text:style-name="P6">・Guild F-30 (1957)</text:p>
      <text:p text:style-name="P6"><text:s text:c="2"/>Phase : Mature　<text:span text:style-name="T42">10/10</text:span></text:p>
      <text:p text:style-name="P6"><text:s text:c="2"/>Observation : Structural stability confirmed</text:p>
      <text:p text:style-name="P6"/>
      <text:p text:style-name="P6">・Martin <text:span text:style-name="T41">000C-16RB Babyface Signature (2000)</text:span></text:p>
      <text:p text:style-name="P6"><text:s text:c="2"/>Phase : Developing　<text:span text:style-name="T1">6.5</text:span><text:span text:style-name="T42">/10</text:span></text:p>
      <text:p text:style-name="P6"><text:s text:c="2"/>Observation : <text:span text:style-name="T1">Low-end response tightening.　Midrange articulation becoming clearer</text:span></text:p>
      <text:p text:style-name="P19"/>
      <text:p text:style-name="P6">・Martin <text:span text:style-name="T41">OM-28 Marquis ()</text:span></text:p>
      <text:p text:style-name="P6"><text:s text:c="2"/>Phase : Developing　<text:span text:style-name="T1">6</text:span><text:span text:style-name="T42">/10</text:span></text:p>
      <text:p text:style-name="P6"><text:s text:c="2"/>Observation : <text:span text:style-name="T1">Harmonic balance stabilizing.　Dynamic range expanding under light touch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webkit-standard" svg:font-family="webkit-standard"/>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ヒラギノ角ゴシック" style:font-family-asian="ヒラギノ角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3-08T12:41:27.946668213</meta:creation-date>
    <dc:date>2026-03-24T04:05:27.598482704</dc:date>
    <meta:editing-duration>PT1H14M41S</meta:editing-duration>
    <meta:editing-cycles>3</meta:editing-cycles>
    <meta:generator>LibreOffice/7.2.5.2$MacOSX_X86_64 LibreOffice_project/499f9727c189e6ef3471021d6132d4c694f357e5</meta:generator>
    <meta:document-statistic meta:table-count="0" meta:image-count="0" meta:object-count="0" meta:page-count="3" meta:paragraph-count="63" meta:word-count="1450" meta:character-count="2641" meta:non-whitespace-character-count="2326"/>
  </office:meta>
</office:document-meta>
</file>