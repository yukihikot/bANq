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pitch="variable"/>
    <style:font-face style:name="ヒラギノ明朝 ProN1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02a6a" style:font-size-asian="14pt" style:font-size-complex="14pt"/>
    </style:style>
    <style:style style:name="P3" style:family="paragraph" style:parent-style-name="Standard">
      <style:text-properties fo:font-size="14pt" officeooo:rsid="00002a6a" officeooo:paragraph-rsid="00002a6a" style:font-size-asian="14pt" style:font-size-complex="14pt"/>
    </style:style>
    <style:style style:name="P4" style:family="paragraph" style:parent-style-name="Standard">
      <style:text-properties fo:font-size="14pt" officeooo:paragraph-rsid="00019a7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paragraph-rsid="00002a6a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officeooo:paragraph-rsid="00019a79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02a6a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はじめての「<text:span text:style-name="T2">IP</text:span>」「<text:span text:style-name="T2">CP</text:span>」</text:p>
      <text:p text:style-name="P3"/>
      <text:p text:style-name="P3">bANqはシンプルに言うとIPとCPを扱う会社です。</text:p>
      <text:p text:style-name="P3">このJournalではそもそもIPやCPとは何かと言うことを端的ににお伝えします。以下の記事ではわかりやすくする為にIPは音楽・楽曲、CPはギターを例に話を進めています。</text:p>
      <text:p text:style-name="P3"/>
      <text:p text:style-name="P3"/>
      <text:p text:style-name="P6">【ギターから理解する、IPとCPの考え方】</text:p>
      <text:p text:style-name="P1"/>
      <text:p text:style-name="P1">1. ギターは「完成したもの」ではありません</text:p>
      <text:p text:style-name="P1"/>
      <text:p text:style-name="P1">アコースティックギターは、</text:p>
      <text:p text:style-name="P1">作られた瞬間が完成ではありません。</text:p>
      <text:p text:style-name="P1"/>
      <text:p text:style-name="P1">弾かれ、時間を経て、環境に影響を受けながら、</text:p>
      <text:p text:style-name="P1">少しずつ音が変わり、育っていきます。</text:p>
      <text:p text:style-name="P1"/>
      <text:p text:style-name="P2">　　　　　　　↓↓↓</text:p>
      <text:p text:style-name="P1"/>
      <text:p text:style-name="P1">2. だから、私たちはギターを「管理」します</text:p>
      <text:p text:style-name="P1"/>
      <text:p text:style-name="P1">良い状態を保ち、</text:p>
      <text:p text:style-name="P1">そのギターが本来持っている可能性を引き出すために、</text:p>
      <text:p text:style-name="P1"><text:tab/>•<text:tab/>環境を整え</text:p>
      <text:p text:style-name="P1"><text:tab/>•<text:tab/>状態を見ながら</text:p>
      <text:p text:style-name="P1"><text:tab/>•<text:tab/>時間をかけて関わる</text:p>
      <text:p text:style-name="P1">という運用を行います。</text:p>
      <text:p text:style-name="P1">これが、bANqのCP（文化資産）の考え方です。</text:p>
      <text:p text:style-name="P1"/>
      <text:p text:style-name="P2">　　　　　　　↓↓↓</text:p>
      <text:p text:style-name="P1">■ 具体例（CP）</text:p>
      <text:p text:style-name="P1"/>
      <text:p text:style-name="P1">同じモデルのギターでも、</text:p>
      <text:p text:style-name="P1"><text:tab/>•<text:tab/>ほとんど弾かれていない個体</text:p>
      <text:p text:style-name="P1"><text:soft-page-break/><text:tab/>•<text:tab/>何千時間も弾き込まれた個体</text:p>
      <text:p text:style-name="P1"/>
      <text:p text:style-name="P1">では、音は全く違います。</text:p>
      <text:p text:style-name="P1"/>
      <text:p text:style-name="P1">bANqでは、例えば：</text:p>
      <text:p text:style-name="P1"><text:tab/>•<text:tab/>定期的に演奏する</text:p>
      <text:p text:style-name="P1"><text:tab/>•<text:tab/>保管環境を調整する</text:p>
      <text:p text:style-name="P1"><text:tab/>•<text:tab/>音の変化を記録する</text:p>
      <text:p text:style-name="P1"/>
      <text:p text:style-name="P1">ことで、そのギターがどう育っていくかを管理します。</text:p>
      <text:p text:style-name="P1"/>
      <text:p text:style-name="P7">つまり、ギターは「買って終わり」ではなく、</text:p>
      <text:p text:style-name="P8">関わり続けることで価値が変わる資産です。</text:p>
      <text:p text:style-name="P1"/>
      <text:p text:style-name="P2">　　　　　　　↓↓↓</text:p>
      <text:p text:style-name="P2"/>
      <text:p text:style-name="P1">3. 実は、音楽も同じです</text:p>
      <text:p text:style-name="P1"/>
      <text:p text:style-name="P1">音楽もまた、作って終わるものではありません。</text:p>
      <text:p text:style-name="P1"/>
      <text:p text:style-name="P1">同じ楽曲でも、</text:p>
      <text:p text:style-name="P1"><text:tab/>•<text:tab/>どこで聴かれるか</text:p>
      <text:p text:style-name="P1"><text:tab/>•<text:tab/>何と組み合わさるか</text:p>
      <text:p text:style-name="P1"><text:tab/>•<text:tab/>どんな形で届けられるか</text:p>
      <text:p text:style-name="P1"/>
      <text:p text:style-name="P1">によって、意味や価値が変わります。</text:p>
      <text:p text:style-name="P1"/>
      <text:p text:style-name="P2">　　　　　　　↓↓↓</text:p>
      <text:p text:style-name="P1"/>
      <text:p text:style-name="P1">■ 具体例（IP）</text:p>
      <text:p text:style-name="P1"/>
      <text:p text:style-name="P1">同じ1曲でも：</text:p>
      <text:p text:style-name="P1"/>
      <text:p text:style-name="P1">・配信で聴かれる場合　→ 日常の中で消費される音楽</text:p>
      <text:p text:style-name="P1">・LPとしてリリースされる場合　→ 作品として所有される音楽</text:p>
      <text:p text:style-name="P1">・アート（例：Hiroshi Nagai）と組み合わさる場合　→ 視覚と結びついた文化的作品</text:p>
      <text:p text:style-name="P1"><text:soft-page-break/>・企業CMで使われる場合　→ ブランドの一部として機能する音楽</text:p>
      <text:p text:style-name="P1"/>
      <text:p text:style-name="P7">音楽・楽曲は同じでも、意味は全く変わる</text:p>
      <text:p text:style-name="P7"/>
      <text:p text:style-name="P2">　　　　　　　↓↓↓</text:p>
      <text:p text:style-name="P2"/>
      <text:p text:style-name="P1">4. これがIP（知的財産）の運用です</text:p>
      <text:p text:style-name="P1"/>
      <text:p text:style-name="P1">音楽は目に見えませんが、</text:p>
      <text:p text:style-name="P1">ギターと同じように</text:p>
      <text:p text:style-name="P1"><text:tab/>•<text:tab/>どこに置くか（配置）</text:p>
      <text:p text:style-name="P1"><text:tab/>•<text:tab/>何と繋ぐか（接続）</text:p>
      <text:p text:style-name="P1"><text:tab/>•<text:tab/>どう展開していくか（変化）</text:p>
      <text:p text:style-name="P1"/>
      <text:p text:style-name="P1">によって価値が変わります。</text:p>
      <text:p text:style-name="P1"/>
      <text:p text:style-name="P2">　　　　　　　↓↓↓</text:p>
      <text:p text:style-name="P1"/>
      <text:p text:style-name="P1">5. bANqはこの2つを同時に扱っています</text:p>
      <text:p text:style-name="P1"><text:tab/>•<text:tab/>ギター（CP）　→ 時間の中で育つもの</text:p>
      <text:p text:style-name="P1"><text:tab/>•<text:tab/>音楽（IP）　　→ 関係の中で変わるもの</text:p>
      <text:p text:style-name="P1"/>
      <text:p text:style-name="P2">　　　　　　　↓↓↓</text:p>
      <text:p text:style-name="P1"/>
      <text:p text:style-name="P1">6. そして、両方に共通していること</text:p>
      <text:p text:style-name="P1"/>
      <text:p text:style-name="P1">それは、</text:p>
      <text:p text:style-name="P1"/>
      <text:p text:style-name="P7">価値は、時間と関わりの中で生まれる</text:p>
      <text:p text:style-name="P1"/>
      <text:p text:style-name="P1">ということです。</text:p>
      <text:p text:style-name="P1"/>
      <text:p text:style-name="P2">　　　　　　　↓↓↓</text:p>
      <text:p text:style-name="P1"/>
      <text:p text:style-name="P1">7. bANqの役割</text:p>
      <text:p text:style-name="P1"/>
      <text:p text:style-name="P1">私たちは、</text:p>
      <text:p text:style-name="P1"><text:soft-page-break/><text:tab/>•<text:tab/>ギターを守り、育てること</text:p>
      <text:p text:style-name="P1"><text:tab/>•<text:tab/>音楽を適切な場所に置き、繋ぎ、展開すること</text:p>
      <text:p text:style-name="P1"/>
      <text:p text:style-name="P1">を通じて、</text:p>
      <text:p text:style-name="P1"/>
      <text:p text:style-name="P9"><text:span text:style-name="T5">価値を消費するのではなく、</text:span></text:p>
      <text:p text:style-name="P9"><text:span text:style-name="T5">次の時代へ手渡すための運用</text:span></text:p>
      <text:p text:style-name="P4">を行っています。</text:p>
      <text:p text:style-name="P1"/>
      <text:p text:style-name="P2">　　　　　　　↓↓↓</text:p>
      <text:p text:style-name="P1"/>
      <text:p text:style-name="P2">■ <text:span text:style-name="T1">ギターを育てることが分かれば、</text:span></text:p>
      <text:p text:style-name="P2"><text:span text:style-name="T1">　音楽の扱い方も見えてきます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ヒラギノ明朝 ProN" svg:font-family="'ヒラギノ明朝 ProN'" style:font-pitch="variable"/>
    <style:font-face style:name="ヒラギノ明朝 ProN1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4-06T19:09:14.495777867</meta:creation-date>
    <dc:date>2026-04-06T19:27:58.729005074</dc:date>
    <meta:editing-duration>PT2M23S</meta:editing-duration>
    <meta:editing-cycles>1</meta:editing-cycles>
    <meta:document-statistic meta:table-count="0" meta:image-count="0" meta:object-count="0" meta:page-count="4" meta:paragraph-count="76" meta:word-count="1022" meta:character-count="1220" meta:non-whitespace-character-count="1096"/>
    <meta:generator>LibreOffice/7.2.5.2$MacOSX_X86_64 LibreOffice_project/499f9727c189e6ef3471021d6132d4c694f357e5</meta:generator>
  </office:meta>
</office:document-meta>
</file>