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pitch="variable"/>
    <style:font-face style:name="ヒラギノ明朝 ProN1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style:font-name="ヒラギノ明朝 ProN" fo:font-size="22pt" officeooo:paragraph-rsid="001daafd" style:font-name-asian="ヒラギノ明朝 ProN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ヒラギノ明朝 ProN" fo:font-size="22pt" officeooo:paragraph-rsid="001daafd" style:font-name-asian="ヒラギノ明朝 ProN" style:font-size-asian="22pt" style:font-size-complex="22pt"/>
    </style:style>
    <style:style style:name="P3" style:family="paragraph" style:parent-style-name="Standard">
      <style:text-properties style:font-name="ヒラギノ明朝 ProN" fo:font-size="16pt" officeooo:paragraph-rsid="001daafd" style:font-name-asian="ヒラギノ明朝 ProN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ヒラギノ明朝 ProN" fo:font-size="16pt" officeooo:paragraph-rsid="001daafd" style:font-name-asian="ヒラギノ明朝 ProN" style:font-size-asian="16pt" style:font-size-complex="16pt"/>
    </style:style>
    <style:style style:name="P5" style:family="paragraph" style:parent-style-name="Standard">
      <style:text-properties style:font-name="ヒラギノ明朝 ProN" fo:font-size="16pt" officeooo:paragraph-rsid="001f6d44" style:font-name-asian="ヒラギノ明朝 ProN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ヒラギノ明朝 ProN" fo:font-size="16pt" officeooo:paragraph-rsid="001daafd" style:font-name-asian="ヒラギノ明朝 ProN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ヒラギノ明朝 ProN" fo:font-size="18pt" fo:font-weight="bold" officeooo:paragraph-rsid="001f6d44" style:font-name-asian="ヒラギノ明朝 ProN" style:font-size-asian="18pt" style:font-weight-asian="bold" style:font-size-complex="18pt" style:font-weight-complex="bold"/>
    </style:style>
    <style:style style:name="T1" style:family="text">
      <style:text-properties officeooo:rsid="000e63a4"/>
    </style:style>
    <style:style style:name="T2" style:family="text">
      <style:text-properties officeooo:rsid="000fedeb"/>
    </style:style>
    <style:style style:name="T3" style:family="text">
      <style:text-properties officeooo:rsid="000e7b80"/>
    </style:style>
    <style:style style:name="T4" style:family="text">
      <style:text-properties officeooo:rsid="001f8d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『<text:span text:style-name="T4">bANq的</text:span><text:span text:style-name="T1">IPとは</text:span>』</text:p>
      <text:p text:style-name="P1"/>
      <text:p text:style-name="P3">一般的なIP（Intellectual Property）とは、人間の創造によって生まれた無形の財産である。</text:p>
      <text:p text:style-name="P3"/>
      <text:p text:style-name="P3">主な分類：</text:p>
      <text:p text:style-name="P3"><text:tab/>•<text:tab/>著作権（音楽・文章・アート）</text:p>
      <text:p text:style-name="P3"><text:tab/>•<text:tab/>商標（名前・ロゴ）</text:p>
      <text:p text:style-name="P3"><text:tab/>•<text:tab/>特許（技術）</text:p>
      <text:p text:style-name="P3"/>
      <text:p text:style-name="P3">これは「権利」の話です。しかしbANqが扱うIPはここではない。</text:p>
      <text:p text:style-name="P3">私達がやろうとしているのは、IPの“法的所有”ではなく“運用”</text:p>
      <text:p text:style-name="P3"/>
      <text:p text:style-name="P3"/>
      <text:p text:style-name="P1">『bANq的IPの定義』</text:p>
      <text:p text:style-name="P1"/>
      <text:p text:style-name="P3">IP = 3層構造</text:p>
      <text:p text:style-name="P3"/>
      <text:p text:style-name="P3">① Core（中核）＝ 作品そのもの</text:p>
      <text:p text:style-name="P3"/>
      <text:p text:style-name="P3">　•楽曲　　•メロディ　　•音源</text:p>
      <text:p text:style-name="P3"/>
      <text:p text:style-name="P3">　⇨一見ここは固定に見える</text:p>
      <text:p text:style-name="P3"/>
      <text:p text:style-name="P3">② Context（文脈）＝ どこに置かれるか</text:p>
      <text:p text:style-name="P3"/>
      <text:p text:style-name="P3"><text:tab/>•　LPとして出るのか</text:p>
      <text:p text:style-name="P3"><text:tab/>•　ストリーミングか</text:p>
      <text:p text:style-name="P3"><text:soft-page-break/><text:tab/>•　映像と組むのか</text:p>
      <text:p text:style-name="P3"><text:tab/>•　誰と組むのか</text:p>
      <text:p text:style-name="P3"/>
      <text:p text:style-name="P3">　⇨ここで意味が変わる</text:p>
      <text:p text:style-name="P3"/>
      <text:p text:style-name="P3">③ Relation（関係性）＝何と接続されるか</text:p>
      <text:p text:style-name="P3"/>
      <text:p text:style-name="P3"><text:tab/>•　アート</text:p>
      <text:p text:style-name="P3"><text:tab/>•　企業</text:p>
      <text:p text:style-name="P3"><text:tab/>•　ギター（CP）</text:p>
      <text:p text:style-name="P3"><text:tab/>•　時代</text:p>
      <text:p text:style-name="P3"/>
      <text:p text:style-name="P3">　⇨ここで価値が変わる</text:p>
      <text:p text:style-name="P3"/>
      <text:p text:style-name="P3"/>
      <text:p text:style-name="P1">『具体例』</text:p>
      <text:p text:style-name="P1"/>
      <text:p text:style-name="P3">同じ楽曲でも：</text:p>
      <text:p text:style-name="P3"/>
      <text:p text:style-name="P5">ケース①　</text:p>
      <text:p text:style-name="P5">Spotifyにアップ　</text:p>
      <text:p text:style-name="P5">→　 消費される音源</text:p>
      <text:p text:style-name="P5"/>
      <text:p text:style-name="P5">ケース②　</text:p>
      <text:p text:style-name="P5">LPや<text:span text:style-name="T1">CD</text:span>でアートと組む</text:p>
      <text:p text:style-name="P5">　→　文化的作品</text:p>
      <text:p text:style-name="P5"/>
      <text:p text:style-name="P5">ケース③　</text:p>
      <text:p text:style-name="P5">CMに使われる</text:p>
      <text:p text:style-name="P5"><text:soft-page-break/>　→　ブランドの一部</text:p>
      <text:p text:style-name="P5"/>
      <text:p text:style-name="P3">　⇨作品は同じでも、IP的価値は変わっている</text:p>
      <text:p text:style-name="P3"/>
      <text:p text:style-name="P3"/>
      <text:p text:style-name="P3"/>
      <text:p text:style-name="P2">『bANqがやろうとしていることは』</text:p>
      <text:p text:style-name="P7">IPを「売るもの」ではなく、</text:p>
      <text:p text:style-name="P7">「配置し続けるもの」として扱う事</text:p>
      <text:p text:style-name="P6"/>
      <text:p text:style-name="P3"/>
      <text:p text:style-name="P3"/>
      <text:p text:style-name="P1">『<text:span text:style-name="T2">bANq的</text:span>IP運用とは何か』</text:p>
      <text:p text:style-name="P1"/>
      <text:p text:style-name="P3">IP運用 = 3つの行為</text:p>
      <text:p text:style-name="P3"/>
      <text:p text:style-name="P3">① Place（配置）＝どこに置くか</text:p>
      <text:p text:style-name="P3"/>
      <text:p text:style-name="P3">② Connect（接続）＝何と繋ぐか</text:p>
      <text:p text:style-name="P3"/>
      <text:p text:style-name="P3">③ <text:span text:style-name="T3">Evolve</text:span>（変化）＝継続して変化・進化</text:p>
      <text:p text:style-name="P3"/>
      <text:p text:style-name="P3">　⇨これがbANqのIP Projectsの中身になります。</text:p>
      <text:p text:style-name="P3"/>
      <text:p text:style-name="P3"/>
      <text:p text:style-name="P1">『bANqのIPが強くなる理由』</text:p>
      <text:p text:style-name="P1"/>
      <text:p text:style-name="P3">普通の会社：制作 → リリース → 終了</text:p>
      <text:p text:style-name="P3"><text:soft-page-break/></text:p>
      <text:p text:style-name="P3">bANq：制作 → 配置 → 接続 → 再配置 → 継続</text:p>
      <text:p text:style-name="P3"/>
      <text:p text:style-name="P3">　⇨IPが“生き続ける”</text:p>
      <text:p text:style-name="P3"/>
      <text:p text:style-name="P3"/>
      <text:p text:style-name="P4">IPとは、作品そのものではなく、</text:p>
      <text:p text:style-name="P4">それが置かれる文脈と関係性によって</text:p>
      <text:p text:style-name="P4">変化し続ける資産です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pitch="variable"/>
    <style:font-face style:name="ヒラギノ明朝 ProN1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3-24T03:56:08.163092462</meta:creation-date>
    <dc:date>2026-04-06T19:26:47.608775792</dc:date>
    <meta:editing-duration>PT14M28S</meta:editing-duration>
    <meta:editing-cycles>4</meta:editing-cycles>
    <meta:generator>LibreOffice/7.2.5.2$MacOSX_X86_64 LibreOffice_project/499f9727c189e6ef3471021d6132d4c694f357e5</meta:generator>
    <meta:document-statistic meta:table-count="0" meta:image-count="0" meta:object-count="0" meta:page-count="4" meta:paragraph-count="53" meta:word-count="593" meta:character-count="768" meta:non-whitespace-character-count="699"/>
  </office:meta>
</office:document-meta>
</file>