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価値は時間の中で生まれる</text:p>
      <text:p text:style-name="P1"/>
      <text:p text:style-name="P1">世の中には、時間とともに価値が変わっていくものがあります。</text:p>
      <text:p text:style-name="P1"/>
      <text:p text:style-name="P1">例えば古い楽器。</text:p>
      <text:p text:style-name="P1">長い年月を経たギターやバイオリンの中には、新品では得られない響きを持つものがあります。</text:p>
      <text:p text:style-name="P1"/>
      <text:p text:style-name="P1">古いレコード。</text:p>
      <text:p text:style-name="P1">発売当時はただの音楽作品だったものが、時代を越えて多くの人に影響を与える存在になることもあります。</text:p>
      <text:p text:style-name="P1"/>
      <text:p text:style-name="P1">あるいは、一枚のイラストや写真。</text:p>
      <text:p text:style-name="P1">制作された瞬間だけでなく、時間の中で見方や意味が変わり、文化として残っていくことがあります。</text:p>
      <text:p text:style-name="P1"/>
      <text:p text:style-name="P1">こうしたものに共通しているのは、</text:p>
      <text:p text:style-name="P1">価値が時間の中で形づくられていくということです。</text:p>
      <text:p text:style-name="P1"/>
      <text:p text:style-name="P1">最初から完成された価値があるわけではなく、</text:p>
      <text:p text:style-name="P1">人に触れられ、使われ、見られ、語られながら、少しずつその意味が育っていく。</text:p>
      <text:p text:style-name="P1"/>
      <text:p text:style-name="P1">それはお金の価値とは少し違う種類のものかもしれません。</text:p>
      <text:p text:style-name="P1">数字だけでは測れない、文化的な価値です。</text:p>
      <text:p text:style-name="P1"/>
      <text:p text:style-name="P1">しかし、その価値は決して曖昧なものではありません。</text:p>
      <text:p text:style-name="P1">時間の中で確かに存在し、変化し続けています。</text:p>
      <text:p text:style-name="P1"/>
      <text:p text:style-name="P1">もしそうであるならば、</text:p>
      <text:p text:style-name="P1">その価値を観測し、記録し、理解するという視点があってもよいのかもしれません。</text:p>
      <text:p text:style-name="P1"/>
      <text:p text:style-name="P1">音楽、アート、デザイン、そして楽器。</text:p>
      <text:p text:style-name="P1"/>
      <text:p text:style-name="P1">bANqはそれらが持つ価値を時間の中でどのように生まれ、変化していくのかを見つめていくための場です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ヒラギノ角ゴシック" style:font-family-asian="ヒラギノ角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3-15T16:44:25.765014540</meta:creation-date>
    <dc:date>2026-03-15T16:50:30.534540275</dc:date>
    <meta:editing-duration>PT6M5S</meta:editing-duration>
    <meta:editing-cycles>1</meta:editing-cycles>
    <meta:document-statistic meta:table-count="0" meta:image-count="0" meta:object-count="0" meta:page-count="1" meta:paragraph-count="20" meta:word-count="516" meta:character-count="519" meta:non-whitespace-character-count="519"/>
    <meta:generator>LibreOffice/7.2.5.2$MacOSX_X86_64 LibreOffice_project/499f9727c189e6ef3471021d6132d4c694f357e5</meta:generator>
  </office:meta>
</office:document-meta>
</file>