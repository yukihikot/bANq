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ヒラギノ明朝 ProN" svg:font-family="'ヒラギノ明朝 ProN'" style:font-family-generic="system" style:font-pitch="variable"/>
    <style:font-face style:name="ヒラギノ角ゴシック" svg:font-family="ヒラギノ角ゴシック" style:font-family-generic="system" style:font-pitch="variable"/>
  </office:font-face-decls>
  <office:automatic-styles>
    <style:style style:name="P1" style:family="paragraph" style:parent-style-name="Standard">
      <style:text-properties fo:font-size="13pt" style:font-size-asian="13pt" style:font-size-complex="13pt"/>
    </style:style>
    <style:style style:name="P2" style:family="paragraph" style:parent-style-name="Standard">
      <style:text-properties fo:font-size="13pt" officeooo:paragraph-rsid="001f80d8" style:font-size-asian="13pt" style:font-size-complex="13pt"/>
    </style:style>
    <style:style style:name="P3" style:family="paragraph" style:parent-style-name="Standard">
      <style:text-properties fo:font-size="18pt" style:font-size-asian="18pt" style:font-size-complex="1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ギターは「育つ」のか？</text:p>
      <text:p text:style-name="P1"/>
      <text:p text:style-name="P1">新品のギターより古いギターの方が良い音がする。</text:p>
      <text:p text:style-name="P1">ギターを弾く人の世界ではよく聞く話です。</text:p>
      <text:p text:style-name="P1">実際、ヴィンテージギターの中には、新品の楽器では出せないような奥行きや響きを持つものがあります。では、なぜそんなことが起こるのでしょうか？</text:p>
      <text:p text:style-name="P1"/>
      <text:p text:style-name="P1"/>
      <text:p text:style-name="P2">『木』</text:p>
      <text:p text:style-name="P1">理由の一つは木材という素材にあります。</text:p>
      <text:p text:style-name="P1">アコースティックギターのトップやボディは木でできており、その内部には無数の繊維構造があります。年月が経つと木材はゆっくり乾燥し、内部の構造が安定していきます。これによって振動がよりスムーズに伝わるようになり、結果として音のレスポンスや響きが変化していきます。</text:p>
      <text:p text:style-name="P1"/>
      <text:p text:style-name="P1">『振動の記憶』</text:p>
      <text:p text:style-name="P1">もう一つ重要なのが振動の蓄積です。</text:p>
      <text:p text:style-name="P1">ギターは弦の振動がトップ板に伝わり、ボディ全体が共鳴することで音が生まれます。長い年月の中で何度も弾かれ、振動を受け続けることで、木材はその振動に対して少しずつ“慣れていく”と言われています。</text:p>
      <text:p text:style-name="P1">これは科学的に完全に解明されているわけではありませんが、多くの演奏家や製作家が同じ感覚を共有しています。</text:p>
      <text:p text:style-name="P1"/>
      <text:p text:style-name="P1">『人間とギター』</text:p>
      <text:p text:style-name="P1">そして最後に、人間との関係です。</text:p>
      <text:p text:style-name="P1">ギターは単なる工業製品ではなく、演奏されることで完成していく楽器です。誰かが弾き、音を鳴らし、時間をかけて振動を与える。その積み重ねが、楽器の個性を形づくっていきます。</text:p>
      <text:p text:style-name="P1">もちろん、すべてのギターが必ず「育つ」わけではありません。</text:p>
      <text:p text:style-name="P1">しかし、良い木材と良い設計を持った楽器は、時間とともに音が変化し、より魅力的になっていくことがあります。</text:p>
      <text:p text:style-name="P1">だからこそ、多くの演奏家が長い時間をかけて一本のギターと付き合い続けるのです。</text:p>
      <text:p text:style-name="P1"/>
      <text:p text:style-name="P1">『まとめ』</text:p>
      <text:p text:style-name="P1">ギターは、完成品として手に入るものでもあります。</text:p>
      <text:p text:style-name="P1">しかし同時に、時間とともに変化していく楽器でもあります。</text:p>
      <text:p text:style-name="P1">もしかすると私たちは、ギターを「弾いている」のではなく、</text:p>
      <text:p text:style-name="P1"><text:soft-page-break/>その成長のプロセスに少しだけ関わっているのかもしれません。</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ヒラギノ明朝 ProN" svg:font-family="'ヒラギノ明朝 ProN'" style:font-family-generic="system" style:font-pitch="variable"/>
    <style:font-face style:name="ヒラギノ角ゴシック" svg:font-family="ヒラギノ角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ヒラギノ明朝 ProN" style:font-size-asian="10.5pt" style:language-asian="ja" style:country-asian="JP"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ヒラギノ明朝 ProN" style:font-size-asian="10.5pt" style:language-asian="ja" style:country-asian="JP"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ヒラギノ角ゴシック" style:font-family-asian="ヒラギノ角ゴシック"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6-03-15T16:24:44.459907488</meta:creation-date>
    <dc:date>2026-03-15T16:41:40.885662369</dc:date>
    <meta:editing-duration>PT8M13S</meta:editing-duration>
    <meta:editing-cycles>2</meta:editing-cycles>
    <meta:generator>LibreOffice/7.2.5.2$MacOSX_X86_64 LibreOffice_project/499f9727c189e6ef3471021d6132d4c694f357e5</meta:generator>
    <meta:document-statistic meta:table-count="0" meta:image-count="0" meta:object-count="0" meta:page-count="2" meta:paragraph-count="22" meta:word-count="788" meta:character-count="788" meta:non-whitespace-character-count="788"/>
  </office:meta>
</office:document-meta>
</file>