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価値はどこに保管されるのか？</text:p>
      <text:p text:style-name="P1"/>
      <text:p text:style-name="P1">世の中には、さまざまな価値があります。</text:p>
      <text:p text:style-name="P1"/>
      <text:p text:style-name="P1">お金の価値は銀行に保管されます。</text:p>
      <text:p text:style-name="P1">データの価値はサーバーに保管されます。</text:p>
      <text:p text:style-name="P1"/>
      <text:p text:style-name="P1">では、文化の価値はどこに保管されるのでしょうか。</text:p>
      <text:p text:style-name="P1"/>
      <text:p text:style-name="P1">例えば一曲の音楽。</text:p>
      <text:p text:style-name="P1">一枚のイラスト。</text:p>
      <text:p text:style-name="P1">一本の楽器。</text:p>
      <text:p text:style-name="P1"/>
      <text:p text:style-name="P1">それらは単なる「物」や「データ」として存在しているわけではありません。</text:p>
      <text:p text:style-name="P1">そこには時間、技術、感性、そして人の経験が積み重なっています。</text:p>
      <text:p text:style-name="P1"/>
      <text:p text:style-name="P1">しかし、その価値をきちんと管理したり、観測したりする仕組みは、意外と多くありません。</text:p>
      <text:p text:style-name="P1"/>
      <text:p text:style-name="P1">楽曲はストリーミングのデータとして流れ、</text:p>
      <text:p text:style-name="P1">アートは作品として展示され、</text:p>
      <text:p text:style-name="P1">楽器は演奏の道具として使われる。</text:p>
      <text:p text:style-name="P1"/>
      <text:p text:style-name="P1">けれど、その背後にある価値は、必ずしも整理されているわけではありません。</text:p>
      <text:p text:style-name="P1"/>
      <text:p text:style-name="P1">もし銀行が「お金の価値」を管理する場所だとすれば、</text:p>
      <text:p text:style-name="P1">文化にもまた、それを管理する仕組みがあっても良いのかもしれません。</text:p>
      <text:p text:style-name="P1"/>
      <text:p text:style-name="P1">音楽、アート、デザイン、そして楽器。</text:p>
      <text:p text:style-name="P1"/>
      <text:p text:style-name="P1">それらを単なる所有物としてではなく、</text:p>
      <text:p text:style-name="P1">文化資産として観測し、記録し、管理していくこと。</text:p>
      <text:p text:style-name="P1"/>
      <text:p text:style-name="P1">そうした考え方から、bANqというプロジェクトは生まれました。</text:p>
      <text:p text:style-name="P1"/>
      <text:p text:style-name="P1">bANqは銀行ではありません。</text:p>
      <text:p text:style-name="P1">しかし、文化の価値を見つめ、理解し、未来へ残していくための</text:p>
      <text:p text:style-name="P1">小さな保管庫のような存在かもしれません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3-15T16:41:14.578059324</meta:creation-date>
    <dc:date>2026-03-15T16:43:09.193655549</dc:date>
    <meta:editing-duration>PT1M55S</meta:editing-duration>
    <meta:editing-cycles>1</meta:editing-cycles>
    <meta:document-statistic meta:table-count="0" meta:image-count="0" meta:object-count="0" meta:page-count="1" meta:paragraph-count="24" meta:word-count="516" meta:character-count="522" meta:non-whitespace-character-count="522"/>
    <meta:generator>LibreOffice/7.2.5.2$MacOSX_X86_64 LibreOffice_project/499f9727c189e6ef3471021d6132d4c694f357e5</meta:generator>
  </office:meta>
</office:document-meta>
</file>