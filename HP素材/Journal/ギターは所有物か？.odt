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ギターは「所有物」か？「文化資産」か？</text:p>
      <text:p text:style-name="P1"/>
      <text:p text:style-name="P1">私たちは普段、ギターを「所有物」として扱っています。</text:p>
      <text:p text:style-name="P1">買う、売る、集める、保管する。</text:p>
      <text:p text:style-name="P1"/>
      <text:p text:style-name="P1">しかし本当にギターは、ただの所有物なのでしょうか。</text:p>
      <text:p text:style-name="P1"/>
      <text:p text:style-name="P1">楽器は、人間の時間よりも長く存在するものです。</text:p>
      <text:p text:style-name="P1">数十年、あるいは百年という時間を超えて、音を鳴らし続けます。</text:p>
      <text:p text:style-name="P1">その意味で楽器は「物」でありながら、同時に文化を運ぶ媒体でもあります。</text:p>
      <text:p text:style-name="P1"/>
      <text:p text:style-name="P1">ここで重要になるのが「コレクション」と「Stewardship（管理）」の違いです。</text:p>
      <text:p text:style-name="P1"/>
      <text:p text:style-name="P1">コレクションは、所有を目的とした行為です。</text:p>
      <text:p text:style-name="P1">集めること、保持すること、希少性を確保すること。</text:p>
      <text:p text:style-name="P1"/>
      <text:p text:style-name="P1">一方でStewardshipは、</text:p>
      <text:p text:style-name="P1">資産を預かり、次の世代へ最良の状態で渡す責任を意味します。</text:p>
      <text:p text:style-name="P1"/>
      <text:p text:style-name="P1">この考え方は、弦楽器の世界ではよく知られています。</text:p>
      <text:p text:style-name="P1"/>
      <text:p text:style-name="P1">例えば、Antonio Stradivari が制作したStradivarius は、</text:p>
      <text:p text:style-name="P1">単なる高価な楽器として扱われているわけではありません。</text:p>
      <text:p text:style-name="P1"/>
      <text:p text:style-name="P1">多くのストラディバリウスは財団やコレクターが所有していますが、</text:p>
      <text:p text:style-name="P1">実際に演奏するのは現役の演奏家です。</text:p>
      <text:p text:style-name="P1"/>
      <text:p text:style-name="P1">つまり、所有者は「持っている人」ではなく、</text:p>
      <text:p text:style-name="P1">**文化資産の管理者（Steward）**なのです。</text:p>
      <text:p text:style-name="P1"/>
      <text:p text:style-name="P1">楽器は弾かれてこそ価値を持ちます。</text:p>
      <text:p text:style-name="P1">音を出さずに保存するだけでは、その本質は半分しか生きません。</text:p>
      <text:p text:style-name="P1"/>
      <text:p text:style-name="P1">ギターもまた同じです。</text:p>
      <text:p text:style-name="P1"/>
      <text:p text:style-name="P1">良い職人が良い木材で作られた楽器は、</text:p>
      <text:p text:style-name="P1">演奏され、振動し、時間を経ることで音が成熟していきます。</text:p>
      <text:p text:style-name="P1"/>
      <text:p text:style-name="P1">それは人間の一生よりも長い時間のプロセスです。</text:p>
      <text:p text:style-name="P1"/>
      <text:p text:style-name="P1"><text:soft-page-break/>だからこそ、</text:p>
      <text:p text:style-name="P1">私たちは楽器を「所有する」のではなく、</text:p>
      <text:p text:style-name="P1">一定期間、預かっていると考えることもできるのです。</text:p>
      <text:p text:style-name="P1"/>
      <text:p text:style-name="P1">今日弾いている一本のギターも、</text:p>
      <text:p text:style-name="P1">過去の誰かが守り、育ててきたものかもしれません。</text:p>
      <text:p text:style-name="P1"/>
      <text:p text:style-name="P1">そして今度は、</text:p>
      <text:p text:style-name="P1">私たちがその音を未来へ渡していく番なのです。</text:p>
      <text:p text:style-name="P1"/>
      <text:p text:style-name="P1">それがGuitar Stewardshipという考え方です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ヒラギノ角ゴシック" style:font-family-asian="ヒラギノ角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3-15T16:17:53.749646113</meta:creation-date>
    <dc:date>2026-03-15T16:43:21.709465829</dc:date>
    <meta:editing-duration>PT6M55S</meta:editing-duration>
    <meta:editing-cycles>2</meta:editing-cycles>
    <meta:generator>LibreOffice/7.2.5.2$MacOSX_X86_64 LibreOffice_project/499f9727c189e6ef3471021d6132d4c694f357e5</meta:generator>
    <meta:document-statistic meta:table-count="0" meta:image-count="0" meta:object-count="0" meta:page-count="2" meta:paragraph-count="33" meta:word-count="697" meta:character-count="770" meta:non-whitespace-character-count="766"/>
  </office:meta>
</office:document-meta>
</file>