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ヒラギノ明朝 ProN" svg:font-family="'ヒラギノ明朝 ProN'" style:font-pitch="variable"/>
    <style:font-face style:name="ヒラギノ明朝 ProN1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P1" style:family="paragraph" style:parent-style-name="Standard">
      <style:text-properties style:font-name="ヒラギノ明朝 ProN" fo:font-size="16pt" style:font-name-asian="ヒラギノ明朝 ProN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ヒラギノ明朝 ProN" fo:font-size="16pt" officeooo:paragraph-rsid="000e7b80" style:font-name-asian="ヒラギノ明朝 ProN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ヒラギノ明朝 ProN" fo:font-size="16pt" officeooo:rsid="000fedeb" officeooo:paragraph-rsid="000fedeb" style:font-name-asian="ヒラギノ明朝 ProN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ヒラギノ明朝 ProN" fo:font-size="16pt" officeooo:rsid="000fedeb" officeooo:paragraph-rsid="0010fdc1" style:font-name-asian="ヒラギノ明朝 ProN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ヒラギノ明朝 ProN" fo:font-size="26pt" style:font-name-asian="ヒラギノ明朝 ProN" style:font-size-asian="26pt" style:font-size-complex="26pt"/>
    </style:style>
    <style:style style:name="P6" style:family="paragraph" style:parent-style-name="Standard">
      <style:paragraph-properties fo:text-align="start" style:justify-single-word="false"/>
      <style:text-properties style:font-name="ヒラギノ明朝 ProN" fo:font-size="20pt" officeooo:rsid="000fedeb" officeooo:paragraph-rsid="000fedeb" style:font-name-asian="ヒラギノ明朝 ProN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ヒラギノ明朝 ProN" fo:font-size="16pt" officeooo:rsid="0010fdc1" officeooo:paragraph-rsid="000fedeb" style:font-name-asian="ヒラギノ明朝 ProN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ヒラギノ明朝 ProN" fo:font-size="16pt" officeooo:rsid="000fedeb" officeooo:paragraph-rsid="000fedeb" style:font-name-asian="ヒラギノ明朝 ProN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ヒラギノ明朝 ProN" fo:font-size="16pt" officeooo:rsid="000fedeb" officeooo:paragraph-rsid="00145e5c" style:font-name-asian="ヒラギノ明朝 ProN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ヒラギノ明朝 ProN" fo:font-size="16pt" officeooo:rsid="000fedeb" officeooo:paragraph-rsid="0014a381" style:font-name-asian="ヒラギノ明朝 ProN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ヒラギノ明朝 ProN" fo:font-size="20pt" officeooo:rsid="000fedeb" officeooo:paragraph-rsid="000fedeb" style:font-name-asian="ヒラギノ明朝 ProN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20pt" fo:letter-spacing="normal" officeooo:paragraph-rsid="000e7b80" style:font-name-asian="Liberation Serif" style:font-size-asian="20pt" style:font-style-asian="normal" style:font-weight-asian="normal" style:font-size-complex="20pt"/>
    </style:style>
    <style:style style:name="P13" style:family="paragraph" style:parent-style-name="Standard">
      <style:text-properties style:font-name="Liberation Serif" fo:font-size="16pt" officeooo:paragraph-rsid="000e63a4" style:font-name-asian="ヒラギノ明朝 ProN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officeooo:paragraph-rsid="000e7b80" style:font-name-asian="ヒラギノ明朝 ProN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officeooo:paragraph-rsid="0014aa96" style:font-name-asian="ヒラギノ明朝 ProN" style:font-size-asian="14pt" style:font-size-complex="14pt"/>
    </style:style>
    <style:style style:name="P16" style:family="paragraph" style:parent-style-name="Standard">
      <style:text-properties style:font-name="Liberation Serif" fo:font-size="14pt" officeooo:paragraph-rsid="000e63a4" style:font-name-asian="ヒラギノ明朝 ProN" style:font-size-asian="14pt" style:font-size-complex="14pt"/>
    </style:style>
    <style:style style:name="P17" style:family="paragraph" style:parent-style-name="Text_20_body">
      <style:paragraph-properties fo:text-align="start" style:justify-single-word="false"/>
      <style:text-properties style:font-name="Liberation Serif" fo:font-size="20pt" officeooo:paragraph-rsid="0014aa96" style:font-name-asian="Liberation Serif" style:font-size-asian="20pt" style:font-size-complex="20pt"/>
    </style:style>
    <style:style style:name="T1" style:family="text">
      <style:text-properties officeooo:rsid="000e63a4"/>
    </style:style>
    <style:style style:name="T2" style:family="text">
      <style:text-properties officeooo:rsid="0010fdc1"/>
    </style:style>
    <style:style style:name="T3" style:family="text">
      <style:text-properties officeooo:rsid="00114c9f"/>
    </style:style>
    <style:style style:name="T4" style:family="text">
      <style:text-properties officeooo:rsid="0012cb81"/>
    </style:style>
    <style:style style:name="T5" style:family="text">
      <style:text-properties officeooo:rsid="00145e5c"/>
    </style:style>
    <style:style style:name="T6" style:family="text">
      <style:text-properties officeooo:rsid="0014a381"/>
    </style:style>
    <style:style style:name="T7" style:family="text">
      <style:text-properties officeooo:rsid="00242877"/>
    </style:style>
    <style:style style:name="T8" style:family="text">
      <style:text-properties officeooo:rsid="0014aa96"/>
    </style:style>
    <style:style style:name="T9" style:family="text">
      <style:text-properties fo:font-variant="normal" fo:text-transform="none" fo:color="#000000" loext:opacity="100%" fo:letter-spacing="normal" officeooo:rsid="0014aa96" style:font-style-asian="normal" style:font-weight-asian="normal"/>
    </style:style>
    <style:style style:name="T10" style:family="text">
      <style:text-properties fo:font-variant="normal" fo:text-transform="none" fo:color="#000000" loext:opacity="100%" fo:letter-spacing="normal" officeooo:rsid="00242877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P <text:span text:style-name="T1">&amp; Creative Projects</text:span></text:p>
      <text:p text:style-name="P1"/>
      <text:p text:style-name="P2">音楽、アート・デザインの交差点における創造</text:p>
      <text:p text:style-name="P2"/>
      <text:p text:style-name="P6">【Concept】</text:p>
      <text:p text:style-name="P3">bANqは、IP(知的財産)を単なる制作物ではなく、どのように届け、どのように残り、どのように展開されるか、その全体を設計・運用します。音楽IPを起点に、複数の領域と接続可能な<text:span text:style-name="T5">IP(知的財産)として</text:span>運用します。</text:p>
      <text:p text:style-name="P9">IPの価値は、それ単体で完結するものではなく、どのような関係の中に置かれるかによって定義され、その意味と価値が更新されていきます。</text:p>
      <text:p text:style-name="P10">　⇨<text:span text:style-name="T6">IPとは</text:span><text:span text:style-name="T5">（Journal）</text:span></text:p>
      <text:p text:style-name="P3"/>
      <text:p text:style-name="P6">【What <text:span text:style-name="T2">we do】</text:span></text:p>
      <text:p text:style-name="P7">音楽<text:span text:style-name="T5">IPを基盤とし、以下の領域と接続・運用します。</text:span></text:p>
      <text:p text:style-name="P7"/>
      <text:p text:style-name="P7">・Music IP</text:p>
      <text:p text:style-name="P9">作品そのものの設計と運用。リリース、文脈<text:span text:style-name="T2">(作品の位置づけ・意味づけ)、</text:span>流通<text:span text:style-name="T3">(</text:span>フィジカル・デジタル等<text:span text:style-name="T3">)を含め</text:span><text:span text:style-name="T2">、</text:span>IPとしての持続性を設計する。</text:p>
      <text:p text:style-name="P10">　⇨<text:span text:style-name="T4">bANq IP制作プロジェクト”BANQUE(S)T”（</text:span><text:span text:style-name="T6">News</text:span><text:span text:style-name="T4">）</text:span></text:p>
      <text:p text:style-name="P4"/>
      <text:p text:style-name="P3">・Art / Design IP</text:p>
      <text:p text:style-name="P3">アートやデザインとの接続により、音楽<text:span text:style-name="T5">IPの</text:span>解釈と体験を拡張する。</text:p>
      <text:p text:style-name="P10">　⇨永井博氏とのコラボ・プロジェクト<text:span text:style-name="T4">（</text:span><text:span text:style-name="T6">News</text:span><text:span text:style-name="T4">）</text:span></text:p>
      <text:p text:style-name="P3"/>
      <text:p text:style-name="P3"/>
      <text:p text:style-name="P3"><text:soft-page-break/>・Corporate / Commercial</text:p>
      <text:p text:style-name="P3">企業やブランド、メディアとの関係の中で、IPを社会的文脈に配置する。</text:p>
      <text:p text:style-name="P3"/>
      <text:p text:style-name="P3">・Cultural Property（CP）</text:p>
      <text:p text:style-name="P3">楽器や文化資産と接続により、音楽IPを物理的・時間的な文脈の中で再定義する。</text:p>
      <text:p text:style-name="P10">　⇨<text:span text:style-name="T5">名曲と名器の関係</text:span><text:bookmark-start text:name="__DdeLink__570_1017733559"/><text:span text:style-name="T5">（Jou</text:span><text:span text:style-name="T6">r</text:span><text:span text:style-name="T5">nal）</text:span><text:bookmark-end text:name="__DdeLink__570_1017733559"/></text:p>
      <text:p text:style-name="P3"/>
      <text:p text:style-name="P3">・<text:span text:style-name="T5">Format / Distribution</text:span></text:p>
      <text:p text:style-name="P3">フィジカルおよびデジタル双方において、適切なフォーマットと流通設計を行う。</text:p>
      <text:p text:style-name="P3"/>
      <text:p text:style-name="P3"/>
      <text:p text:style-name="P3">（↓図にしたい）</text:p>
      <text:p text:style-name="P3">領域　　　　　　　　IP側　　　　　　　　CP側</text:p>
      <text:p text:style-name="P3">対象　　　　　　　知的資産　　　　　　文化資産</text:p>
      <text:p text:style-name="P3">方法　　　　　　　接続・運用　　　　　保護・育成</text:p>
      <text:p text:style-name="P3">時間軸　　　　　　文脈・関係性　　　　物理・経年</text:p>
      <text:p text:style-name="P3">本質　　　　　　　関係で定義　　　　　時間で変化</text:p>
      <text:p text:style-name="P12"/>
      <text:p text:style-name="P12"/>
      <text:p text:style-name="P12"/>
      <text:p text:style-name="P17"><text:span text:style-name="T9">IP Activity Log</text:span><text:span text:style-name="T10">(※See Instagram)</text:span></text:p>
      <text:p text:style-name="P15"/>
      <text:p text:style-name="P15">・Project : BANQUE(S)T (musiqman Jr.)</text:p>
      <text:p text:style-name="P15">Placement：LP / Streaming</text:p>
      <text:p text:style-name="P15">Connection：Hiroshi Nagai Illustration、Acoustic Guitar (CP)</text:p>
      <text:p text:style-name="P15">Context：Listening Work</text:p>
      <text:p text:style-name="P15">Phase：<text:span text:style-name="T8">Developing</text:span></text:p>
      <text:p text:style-name="P15"/>
      <text:p text:style-name="P15"><text:soft-page-break/>・Project : 冬の物語 (musiqman Jr.)</text:p>
      <text:p text:style-name="P15">Placement：<text:span text:style-name="T8">CD</text:span> / Streaming</text:p>
      <text:p text:style-name="P15">Connection：Hiroshi Nagai Illustration、Acoustic Guitar (CP)</text:p>
      <text:p text:style-name="P15">Context：Listening Work</text:p>
      <text:p text:style-name="P15">Phase：<text:span text:style-name="T8">In Development</text:span></text:p>
      <text:p text:style-name="P13"/>
      <text:p text:style-name="P16">・Project：Untitled Session</text:p>
      <text:p text:style-name="P16">Placement：Pre Recording</text:p>
      <text:p text:style-name="P16">Connection：VintageAcousticGuitar<text:span text:style-name="T8">(CP)</text:span>、No Visual</text:p>
      <text:p text:style-name="P16">Context：Private Work</text:p>
      <text:p text:style-name="P16">Phase：Develop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ヒラギノ明朝 ProN" svg:font-family="'ヒラギノ明朝 ProN'" style:font-pitch="variable"/>
    <style:font-face style:name="ヒラギノ明朝 ProN1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ヒラギノ明朝 ProN1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ヒラギノ明朝 ProN1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ヒラギノ角ゴシック" style:font-family-asian="ヒラギノ角ゴシック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6-03-24T03:32:57.316049244</meta:creation-date>
    <meta:editing-duration>PT26M24S</meta:editing-duration>
    <meta:editing-cycles>5</meta:editing-cycles>
    <meta:generator>LibreOffice/7.2.5.2$MacOSX_X86_64 LibreOffice_project/499f9727c189e6ef3471021d6132d4c694f357e5</meta:generator>
    <dc:date>2026-03-24T04:10:19.980542141</dc:date>
    <meta:document-statistic meta:table-count="0" meta:image-count="0" meta:object-count="0" meta:page-count="3" meta:paragraph-count="43" meta:word-count="644" meta:character-count="1252" meta:non-whitespace-character-count="1140"/>
  </office:meta>
</office:document-meta>
</file>